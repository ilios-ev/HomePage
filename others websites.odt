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left="0in" fo:margin-right="0in" fo:text-indent="0in" style:auto-text-indent="false"/>
    </style:style>
    <style:style style:name="P2" style:family="paragraph" style:parent-style-name="Heading_20_3">
      <style:paragraph-properties fo:margin-left="0in" fo:margin-right="0in" fo:text-indent="0in" style:auto-text-indent="false"/>
    </style:style>
    <style:style style:name="P3" style:family="paragraph" style:parent-style-name="Text_20_body" style:list-style-name="L1">
      <style:paragraph-properties fo:margin-left="0in" fo:margin-right="0in" fo:margin-top="0in" fo:margin-bottom="0in" style:contextual-spacing="false" fo:text-indent="0in" style:auto-text-indent="false"/>
    </style:style>
    <style:style style:name="P4" style:family="paragraph" style:parent-style-name="Text_20_body" style:list-style-name="L1">
      <style:paragraph-properties fo:margin-left="0in" fo:margin-right="0in" fo:text-indent="0in" style:auto-text-indent="false"/>
    </style:style>
    <style:style style:name="P5" style:family="paragraph" style:parent-style-name="Text_20_body" style:list-style-name="L2">
      <style:paragraph-properties fo:margin-left="0in" fo:margin-right="0in" fo:margin-top="0in" fo:margin-bottom="0in" style:contextual-spacing="false" fo:text-indent="0in" style:auto-text-indent="false"/>
    </style:style>
    <style:style style:name="P6" style:family="paragraph" style:parent-style-name="Text_20_body" style:list-style-name="L2">
      <style:paragraph-properties fo:margin-left="0in" fo:margin-right="0in" fo:text-indent="0in" style:auto-text-indent="false"/>
    </style:style>
    <style:style style:name="P7" style:family="paragraph" style:parent-style-name="Text_20_body" style:list-style-name="L3">
      <style:paragraph-properties fo:margin-left="0in" fo:margin-right="0in" fo:margin-top="0in" fo:margin-bottom="0in" style:contextual-spacing="false" fo:text-indent="0in" style:auto-text-indent="false"/>
    </style:style>
    <style:style style:name="P8" style:family="paragraph" style:parent-style-name="Text_20_body" style:list-style-name="L3">
      <style:paragraph-properties fo:margin-left="0in" fo:margin-right="0in" fo:text-indent="0in" style:auto-text-indent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 have gathered the specific links for the global leaders and premium service providers I analyzed. These are categorized to help you see the difference between "Hardware/OEM" websites and "Service/Maintenance" websites.</text:p>
      <text:h text:style-name="P2" text:outline-level="3"><text:bookmark text:name="user-content-1-global-oems-fleet-system-benchmarks"/>1. Global OEMs (Fleet System Benchmarks)</text:h>
      <text:p text:style-name="P1">These websites are the industry standard for <text:span text:style-name="Strong_20_Emphasis">B2B Fleet Management Software</text:span> and integrated technology.</text:p>
      <text:list text:style-name="L1">
        <text:list-item>
          <text:p text:style-name="P3"><text:span text:style-name="Strong_20_Emphasis">Club Car Connect (Visage):</text:span> <text:a xlink:type="simple" xlink:href="https://www.clubcar.com/en-us/commercial/fleet-management" text:style-name="Internet_20_link" text:visited-style-name="Visited_20_Internet_20_Link">clubcar.com/fleet-management</text:a></text:p>
          <text:list>
            <text:list-item>
              <text:p text:style-name="P3"><text:span text:style-name="Emphasis">Why analyze:</text:span> Best-in-class B2B ROI messaging and "Connected" tech marketing.</text:p>
            </text:list-item>
          </text:list>
        </text:list-item>
        <text:list-item>
          <text:p text:style-name="P3"><text:span text:style-name="Strong_20_Emphasis">E-Z-GO (Textron Fleet Management):</text:span> <text:a xlink:type="simple" xlink:href="https://ezgo.txtsv.com/commercial/fleet-management" text:style-name="Internet_20_link" text:visited-style-name="Visited_20_Internet_20_Link">ezgo.txtsv.com/fleet-management</text:a></text:p>
          <text:list>
            <text:list-item>
              <text:p text:style-name="P3"><text:span text:style-name="Emphasis">Why analyze:</text:span> Focus on Lithium-Ion (ELiTE) efficiency and durable asset tracking.</text:p>
            </text:list-item>
          </text:list>
        </text:list-item>
        <text:list-item>
          <text:p text:style-name="P3"><text:span text:style-name="Strong_20_Emphasis">Yamaha (YamaTrack):</text:span> <text:a xlink:type="simple" xlink:href="https://yamahagolfcar.com/yamatrack/" text:style-name="Internet_20_link" text:visited-style-name="Visited_20_Internet_20_Link">yamahagolfcar.com/yamatrack</text:a></text:p>
          <text:list>
            <text:list-item>
              <text:p text:style-name="P4"><text:span text:style-name="Emphasis">Why analyze:</text:span> Messaging centers on "reliability" and simple user-interface design.</text:p>
            </text:list-item>
          </text:list>
        </text:list-item>
      </text:list>
      <text:h text:style-name="P2" text:outline-level="3"><text:bookmark text:name="user-content-2-premium-service--maintenance-uae-benchmarks"/>2. Premium Service &amp; Maintenance (UAE Benchmarks)</text:h>
      <text:p text:style-name="P1">These are local competitors specializing in the <text:span text:style-name="Strong_20_Emphasis">Ecosystem/AMC</text:span> (Annual Maintenance Contract) model.</text:p>
      <text:list text:style-name="L2">
        <text:list-item>
          <text:p text:style-name="P5"><text:span text:style-name="Strong_20_Emphasis">Luxury Carts (UAE/KSA):</text:span> <text:a xlink:type="simple" xlink:href="https://luxurycartsgroup.com/" text:style-name="Internet_20_link" text:visited-style-name="Visited_20_Internet_20_Link">luxurycartsgroup.com</text:a></text:p>
          <text:list>
            <text:list-item>
              <text:p text:style-name="P5"><text:span text:style-name="Emphasis">Strength:</text:span> High-end refurbishment and preventative maintenance contracts for premium resorts.</text:p>
            </text:list-item>
          </text:list>
        </text:list-item>
        <text:list-item>
          <text:p text:style-name="P5"><text:span text:style-name="Strong_20_Emphasis">Destino Kart (UAE):</text:span> <text:a xlink:type="simple" xlink:href="https://destino-kart.com/" text:style-name="Internet_20_link" text:visited-style-name="Visited_20_Internet_20_Link">destino-kart.com</text:a></text:p>
          <text:list>
            <text:list-item>
              <text:p text:style-name="P5"><text:span text:style-name="Emphasis">Strength:</text:span> Comprehensive repair and AMC packages with a focus on quick turnaround.</text:p>
            </text:list-item>
          </text:list>
        </text:list-item>
        <text:list-item>
          <text:p text:style-name="P5"><text:span text:style-name="Strong_20_Emphasis">Premier Cart (UAE):</text:span> <text:a xlink:type="simple" xlink:href="https://premierbuggy.com/" text:style-name="Internet_20_link" text:visited-style-name="Visited_20_Internet_20_Link">premierbuggy.com</text:a></text:p>
          <text:list>
            <text:list-item>
              <text:p text:style-name="P6"><text:span text:style-name="Emphasis">Strength:</text:span> Focus on premium EV support and mobile technician dispatch.</text:p>
            </text:list-item>
          </text:list>
        </text:list-item>
      </text:list>
      <text:h text:style-name="P2" text:outline-level="3"><text:bookmark text:name="user-content-3-specialized-fleet-service-usa-benchmarks"/>3. Specialized Fleet Service (USA Benchmarks)</text:h>
      <text:p text:style-name="P1">These providers excel at the <text:span text:style-name="Strong_20_Emphasis">"On-Site Partner"</text:span> messaging that ilios aims to perfect.</text:p>
      <text:list text:style-name="L3">
        <text:list-item>
          <text:p text:style-name="P7"><text:span text:style-name="Strong_20_Emphasis">Mobile Golf Cart Repair:</text:span> <text:a xlink:type="simple" xlink:href="https://mobilegolfcartrepair.com/" text:style-name="Internet_20_link" text:visited-style-name="Visited_20_Internet_20_Link">mobilegolfcartrepair.com</text:a></text:p>
          <text:list>
            <text:list-item>
              <text:p text:style-name="P7"><text:span text:style-name="Emphasis">Insight:</text:span> They market "Downtime Reduction" as their primary product, which aligns with our "Zero Downtime" goal.</text:p>
            </text:list-item>
          </text:list>
        </text:list-item>
        <text:list-item>
          <text:p text:style-name="P7"><text:span text:style-name="Strong_20_Emphasis">Cart Service U.S.A.:</text:span> <text:a xlink:type="simple" xlink:href="https://cartserviceusa.com/" text:style-name="Internet_20_link" text:visited-style-name="Visited_20_Internet_20_Link">cartserviceusa.com</text:a></text:p>
          <text:list>
            <text:list-item>
              <text:p text:style-name="P7"><text:span text:style-name="Emphasis">Insight:</text:span> Strong emphasis on on-site preventative maintenance for all makes and models (Brand Agnostic).</text:p>
            </text:list-item>
          </text:list>
        </text:list-item>
        <text:list-item>
          <text:p text:style-name="P7"><text:span text:style-name="Strong_20_Emphasis">ACE of Carts:</text:span> <text:a xlink:type="simple" xlink:href="https://aceofcarts.com/" text:style-name="Internet_20_link" text:visited-style-name="Visited_20_Internet_20_Link">aceofcarts.com</text:a></text:p>
          <text:list>
            <text:list-item>
              <text:p text:style-name="P8"><text:span text:style-name="Emphasis">Insight:</text:span> Tailored fleet programs for varying sizes (Resorts to Small Businesses).</text:p>
            </text:list-item>
          </text:list>
        </text:list-item>
      </text:list>
      <text:h text:style-name="P2" text:outline-level="3"><text:bookmark text:name="user-content-summary-for-your-strategy"/>Summary for your Strategy:</text:h>
      <text:p text:style-name="P1">Most of these sites fall into two traps: they are either <text:span text:style-name="Strong_20_Emphasis">too corporate/stiff</text:span> (OEMs) or <text:span text:style-name="Strong_20_Emphasis">too "garage-style"</text:span> (Independent shops). <text:span text:style-name="Strong_20_Emphasis">ilios</text:span> has the opportunity to dominate by having a website that looks like <text:soft-page-break/>a <text:span text:style-name="Strong_20_Emphasis">high-tech Silicon Valley SaaS</text:span> (the Dashboard/Ecosystem side) while maintaining the <text:span text:style-name="Strong_20_Emphasis">engineering precision</text:span> of a Mechatronics agency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05T10:58:06.443137100</meta:creation-date>
    <dc:date>2026-05-05T10:59:07.694756700</dc:date>
    <meta:editing-duration>PT1M3S</meta:editing-duration>
    <meta:editing-cycles>1</meta:editing-cycles>
    <meta:document-statistic meta:table-count="0" meta:image-count="0" meta:object-count="0" meta:page-count="2" meta:paragraph-count="27" meta:word-count="302" meta:character-count="2188" meta:non-whitespace-character-count="1931"/>
    <meta:generator>LibreOffice/25.8.5.2$Windows_X86_64 LibreOffice_project/9c8b85f387cc00a89945a79c9e6239f32e450ac2</meta:generator>
  </office:meta>
</office:document-meta>
</file>